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, monospac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, NanumGothic, sans-serif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8785in"/>
    </style:style>
    <style:style style:name="Table1.B" style:family="table-column">
      <style:table-column-properties style:column-width="4.81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.0555in" fo:margin-bottom="0in" style:contextual-spacing="false"/>
    </style:style>
    <style:style style:name="P5" style:family="paragraph" style:parent-style-name="Text_20_body">
      <style:paragraph-properties fo:margin-top="0.1807in" fo:margin-bottom="0.0555in" style:contextual-spacing="false"/>
    </style:style>
    <style:style style:name="T1" style:family="text">
      <style:text-properties fo:background-color="#fff6d8" loext:char-shading-value="0" loext:padding-left="0.111in" loext:padding-right="0in" loext:padding-top="0in" loext:padding-bottom="0in" loext:border-left="3pt solid #d6a72c" loext:border-right="none" loext:border-top="none" loext:border-bottom="none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mentation-aware NDT 주요 폴더 구조</text:p>
      <text:p text:style-name="Text_20_body">이 워크스페이스는 LiDAR 의미 분할 정보를 NDT 맵 생성과 위치추정에 반영하는 ROS 2 프로젝트이다.</text:p>
      <text:h text:style-name="Heading_20_2" text:outline-level="2">1. 주요 폴더 트리</text:h>
      <text:p text:style-name="Preformatted_20_Text">segmentation_aware_ndt_ws/</text:p>
      <text:p text:style-name="Preformatted_20_Text">├── segmentation_aware_ndt/ <text:s text:c="9"/># 실제 개발하는 ROS 2 패키지</text:p>
      <text:p text:style-name="Preformatted_20_Text">│ <text:s text:c="2"/>├── include/ <text:s text:c="21"/># C++ 헤더와 알고리즘 정의</text:p>
      <text:p text:style-name="Preformatted_20_Text">│ <text:s text:c="2"/>├── src/ <text:s text:c="25"/># C++ 구현 및 실행 노드</text:p>
      <text:p text:style-name="Preformatted_20_Text">│ <text:s text:c="2"/>│ <text:s text:c="2"/>├── apps/ <text:s text:c="20"/># 매핑·위치추정 실행 노드</text:p>
      <text:p text:style-name="Preformatted_20_Text">│ <text:s text:c="2"/>│ <text:s text:c="2"/>├── ndt_pca/ <text:s text:c="17"/># PCA 기반 가중 NDT 구현</text:p>
      <text:p text:style-name="Preformatted_20_Text">│ <text:s text:c="2"/>│ <text:s text:c="2"/>├── ndt_omp/ <text:s text:c="17"/># 병렬 NDT/GICP 구현</text:p>
      <text:p text:style-name="Preformatted_20_Text">│ <text:s text:c="2"/>│ <text:s text:c="2"/>└── lidar_odometry/ <text:s text:c="10"/># 전처리·LiDAR odometry 구현</text:p>
      <text:p text:style-name="Preformatted_20_Text">│ <text:s text:c="2"/>└── launch/ <text:s text:c="22"/># ROS 2 실행 설정</text:p>
      <text:p text:style-name="Preformatted_20_Text">├── build/ <text:s text:c="27"/># 빌드 중간 결과</text:p>
      <text:p text:style-name="Preformatted_20_Text">├── install/ <text:s text:c="25"/># 빌드·설치된 실행 환경</text:p>
      <text:p text:style-name="Preformatted_20_Text">├── log/ <text:s text:c="29"/># 빌드 로그</text:p>
      <text:p text:style-name="P2">└── localization_evaluation_*/ <text:s text:c="7"/># 위치추정 rosbag 및 평가 결과</text:p>
      <text:h text:style-name="Heading_20_2" text:outline-level="2">2. 폴더별 역할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폴더</text:p>
          </table:table-cell>
          <table:table-cell table:style-name="Table1.A1" office:value-type="string">
            <text:p text:style-name="Table_20_Heading">무엇을 하는 곳인가?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gmentation_aware_ndt/</text:span></text:p>
          </table:table-cell>
          <table:table-cell table:style-name="Table1.A1" office:value-type="string">
            <text:p text:style-name="Table_20_Contents">프로젝트의 핵심 소스 폴더이다. 알고리즘을 수정하거나 노드·launch 설정을 바꿀 때 이 폴더를 작업한다.</text:p>
          </table:table-cell>
        </table:table-row>
        <table:table-row>
          <table:table-cell table:style-name="Table1.A1" office:value-type="string">
            <text:p text:style-name="Table_20_Contents"><text:span text:style-name="Source_20_Text">build/</text:span></text:p>
          </table:table-cell>
          <table:table-cell table:style-name="Table1.A1" office:value-type="string">
            <text:p text:style-name="Table_20_Contents"><text:span text:style-name="Source_20_Text">colcon build</text:span> 과정에서 생성되는 CMake 캐시와 중간 빌드 결과를 저장한다. 직접 수정하지 않는다.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stall/</text:span></text:p>
          </table:table-cell>
          <table:table-cell table:style-name="Table1.A1" office:value-type="string">
            <text:p text:style-name="Table_20_Contents">빌드가 끝난 실행 파일, 헤더, launch 파일과 <text:span text:style-name="Source_20_Text">setup.bash</text:span>를 저장한다. ROS 노드를 실행하기 전에 이 환경을 source한다.</text:p>
          </table:table-cell>
        </table:table-row>
        <table:table-row>
          <table:table-cell table:style-name="Table1.A1" office:value-type="string">
            <text:p text:style-name="Table_20_Contents"><text:span text:style-name="Source_20_Text">log/</text:span></text:p>
          </table:table-cell>
          <table:table-cell table:style-name="Table1.A1" office:value-type="string">
            <text:p text:style-name="Table_20_Contents">colcon 빌드 기록을 저장한다. 컴파일 오류나 빌드 실패 원인을 확인할 때 사용한다.</text:p>
          </table:table-cell>
        </table:table-row>
        <table:table-row>
          <table:table-cell table:style-name="Table1.A1" office:value-type="string">
            <text:p text:style-name="Table_20_Contents"><text:span text:style-name="Source_20_Text">localization_evaluation_*/</text:span></text:p>
          </table:table-cell>
          <table:table-cell table:style-name="Table1.A1" office:value-type="string">
            <text:p text:style-name="Table_20_Contents">위치추정 결과가 기록된 rosbag과 ground truth 비교 결과를 저장한다. 평가가 완료된 폴더에는 CSV, 요약 파일, 궤적 및 위치 오차 그래프가 들어 있다.</text:p>
          </table:table-cell>
        </table:table-row>
      </table:table>
      <text:h text:style-name="Heading_20_2" text:outline-level="2">3. 핵심 패키지 내부</text:h>
      <text:h text:style-name="Heading_20_3" text:outline-level="3"><text:span text:style-name="Source_20_Text">include/</text:span></text:h>
      <text:p text:style-name="Text_20_body"><text:soft-page-break/>C++ 헤더와 템플릿 구현을 보관한다. LiDAR ground/non-ground 분할, semantic weight가 포함된 NDT voxel 자료구조, PCA-NDT 및 병렬 NDT 관련 정의가 있다.</text:p>
      <text:h text:style-name="Heading_20_3" text:outline-level="3"><text:span text:style-name="Source_20_Text">src/apps/</text:span></text:h>
      <text:p text:style-name="Text_20_body">ROS 2에서 직접 실행하는 핵심 노드가 있다.</text:p>
      <text:list xml:id="list372899662" text:style-name="L1">
        <text:list-item>
          <text:p text:style-name="P4">Semantic map 생성 </text:p>
        </text:list-item>
        <text:list-item>
          <text:p text:style-name="P4">Semantic point map을 NDT voxel map으로 변환 </text:p>
        </text:list-item>
        <text:list-item>
          <text:p text:style-name="P3">Weighted NDT map을 이용한 실시간 위치추정 </text:p>
        </text:list-item>
      </text:list>
      <text:h text:style-name="Heading_20_3" text:outline-level="3"><text:span text:style-name="Source_20_Text">src/ndt_pca/</text:span></text:h>
      <text:p text:style-name="Text_20_body">PCA로 voxel의 선형·평면·분산 구조를 분석하고, 그 결과를 NDT 정합 가중치에 사용하는 핵심 알고리즘 구현이다.</text:p>
      <text:h text:style-name="Heading_20_3" text:outline-level="3"><text:span text:style-name="Source_20_Text">src/ndt_omp/</text:span></text:h>
      <text:p text:style-name="Text_20_body">OpenMP 기반 병렬 NDT/GICP 구현이다. 현재 주 실행 노드는 주로 <text:span text:style-name="Source_20_Text">ndt_pca</text:span> 라이브러리를 사용하며, 이 폴더는 병렬 정합 기능의 참고·확장 코드로 남아 있다.</text:p>
      <text:h text:style-name="Heading_20_3" text:outline-level="3"><text:span text:style-name="Source_20_Text">src/lidar_odometry/</text:span></text:h>
      <text:p text:style-name="Text_20_body">포인트클라우드 전처리와 scan matching odometry 구현이 있다. 현재 핵심 semantic 노드의 빌드 대상과는 분리되어 있다.</text:p>
      <text:h text:style-name="Heading_20_3" text:outline-level="3"><text:span text:style-name="Source_20_Text">launch/</text:span></text:h>
      <text:p text:style-name="Text_20_body">매핑, NDT voxel map 생성, 위치추정을 실행하기 위한 ROS 2 launch 설정을 보관한다. 입력 topic, 맵 경로, 센서 사양, semantic weight, NDT 해상도 등을 이곳에서 설정한다.</text:p>
      <text:p text:style-name="P5"><text:span text:style-name="Strong_20_Emphasis"><text:span text:style-name="T1">작업 기준:</text:span></text:span><text:span text:style-name="T1"> 코드를 수정할 때는 주로 </text:span><text:span text:style-name="Source_20_Text"><text:span text:style-name="T1">segmentation_aware_ndt/include</text:span></text:span><text:span text:style-name="T1">, </text:span><text:span text:style-name="Source_20_Text"><text:span text:style-name="T1">segmentation_aware_ndt/src</text:span></text:span><text:span text:style-name="T1">, </text:span><text:span text:style-name="Source_20_Text"><text:span text:style-name="T1">segmentation_aware_ndt/launch</text:span></text:span><text:span text:style-name="T1">를 보면 된다. </text:span><text:span text:style-name="Source_20_Text"><text:span text:style-name="T1">build</text:span></text:span><text:span text:style-name="T1">, </text:span><text:span text:style-name="Source_20_Text"><text:span text:style-name="T1">install</text:span></text:span><text:span text:style-name="T1">, </text:span><text:span text:style-name="Source_20_Text"><text:span text:style-name="T1">log</text:span></text:span><text:span text:style-name="T1">는 자동 생성 폴더이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, monospac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, NanumGothic, sans-serif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5%"/>
      <style:text-properties fo:color="#202124" loext:opacity="100%" style:font-name="Noto Sans CJK KR" fo:font-family="'Noto Sans CJK KR', NanumGothic, sans-serif" fo:font-size="11pt" style:font-name-asian="Noto Sans CJK KR" style:font-family-asian="'Noto Sans CJK KR', NanumGothic, sans-serif" style:font-size-asian="11pt" style:font-name-complex="Noto Sans CJK KR" style:font-family-complex="'Noto Sans CJK KR', NanumGothic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693in" style:contextual-spacing="false"/>
      <style:text-properties fo:color="#163a5f" loext:opacity="100%" style:font-name="Liberation Sans Unicode MS" fo:font-family="'Liberation Sans Unicode MS'" style:font-pitch="variable" fo:font-size="21pt" fo:font-weight="bold" style:font-size-asian="21pt" style:font-weight-asian="bold" style:font-size-complex="21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left="0.0555in" fo:margin-right="0.0555in" fo:margin-top="0.0555in" fo:margin-bottom="0.0555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78in" fo:margin-bottom="0.0835in" style:contextual-spacing="false" fo:padding-left="0in" fo:padding-right="0in" fo:padding-top="0in" fo:padding-bottom="0.0417in" fo:border-left="none" fo:border-right="none" fo:border-top="none" fo:border-bottom="0.06pt solid #9eb8cc"/>
      <style:text-properties fo:color="#1e5a88" loext:opacity="100%" style:font-name="Liberation Serif" fo:font-family="'Liberation Serif'" style:font-family-generic="roman" style:font-pitch="variable" fo:font-size="15pt" fo:font-weight="bold" style:font-name-asian="Noto Serif CJK SC" style:font-family-asian="'Noto Serif CJK SC'" style:font-family-generic-asian="system" style:font-pitch-asian="variable" style:font-size-asian="15pt" style:font-weight-asian="bold" style:font-name-complex="Lohit Devanagari1" style:font-family-complex="'Lohit Devanagari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1807in" fo:margin-right="0.1807in" fo:margin-top="0.1807in" fo:margin-bottom="0.0417in" style:contextual-spacing="false" fo:text-indent="0in" style:auto-text-indent="false"/>
      <style:text-properties fo:color="#274f6d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45%" fo:padding="0.139in" fo:border="0.06pt solid #d6e0e7"/>
      <style:text-properties style:font-name="DejaVu Sans Mono" fo:font-family="'DejaVu Sans Mono', monospace" fo:font-size="9pt" style:font-name-asian="DejaVu Sans Mono" style:font-family-asian="'DejaVu Sans Mono', monospace" style:font-size-asian="9pt" style:font-name-complex="DejaVu Sans Mono" style:font-family-complex="'DejaVu Sans Mono', monospace" style:font-size-complex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, monospace" fo:background-color="#eef2f5" style:font-name-asian="DejaVu Sans Mono" style:font-family-asian="'DejaVu Sans Mono', monospace" style:font-name-complex="DejaVu Sans Mono" style:font-family-complex="'DejaVu Sans Mono', monospa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egmentation-aware NDT 폴더 구조</dc:title>
    <meta:document-statistic meta:table-count="1" meta:image-count="0" meta:object-count="0" meta:page-count="2" meta:paragraph-count="46" meta:word-count="780" meta:character-count="2024" meta:non-whitespace-character-count="1464"/>
    <meta:generator>LibreOffice/7.3.7.2$Linux_X86_64 LibreOffice_project/30$Build-2</meta:generator>
    <meta:user-defined meta:name=""/>
  </office:meta>
</office:document-meta>
</file>